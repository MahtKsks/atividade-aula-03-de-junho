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F000000BBF068B619.png" manifest:media-type="image/png"/>
  <manifest:file-entry manifest:full-path="Pictures/100000000000034E0000033F4D0A0579.png" manifest:media-type="image/png"/>
  <manifest:file-entry manifest:full-path="Pictures/10000000000002960000016511389C07.png" manifest:media-type="image/png"/>
  <manifest:file-entry manifest:full-path="Pictures/100000000000034A000000F6CD6FAAAA.png" manifest:media-type="image/png"/>
  <manifest:file-entry manifest:full-path="Pictures/10000000000003B100000224036205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495" officeooo:paragraph-rsid="00108495"/>
    </style:style>
    <style:style style:name="P2" style:family="paragraph" style:parent-style-name="Standard">
      <style:text-properties officeooo:rsid="00118ca8" officeooo:paragraph-rsid="00118ca8"/>
    </style:style>
    <style:style style:name="T1" style:family="text">
      <style:text-properties officeooo:rsid="000b40a9"/>
    </style:style>
    <style:style style:name="T2" style:family="text">
      <style:text-properties officeooo:rsid="00118c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12cm, 0.252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4.018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tividade Aula 03 de junho</text:p>
      <text:p text:style-name="P2">Matheus Dalla Rosa Gomes – RA: 2876663</text:p>
      <text:p text:style-name="P1"/>
      <text:p text:style-name="P1">Parte 1 - Descrição da cidade;</text:p>
      <text:p text:style-name="P1"><draw:frame draw:style-name="fr5" draw:name="Figura1" text:anchor-type="char" svg:x="-1.139cm" svg:y="0.312cm" svg:width="19.281cm" svg:height="12.561cm" draw:z-index="0"><draw:image xlink:href="Pictures/10000000000003B10000022403620529.png" xlink:type="simple" xlink:show="embed" xlink:actuate="onLoad" draw:mime-type="image/png"/></draw:frame><draw:frame draw:style-name="fr4" draw:name="Figura2" text:anchor-type="char" svg:y="12.871cm" svg:width="19.054cm" svg:height="6.645cm" draw:z-index="1"><draw:image xlink:href="Pictures/100000000000034A000000F6CD6FAAA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Parte 2 - <text:s/><text:span text:style-name="T1">inserção de imagens e cri</text:span><text:span text:style-name="T2">a</text:span><text:span text:style-name="T1">ção de um diretório específico;</text:span></text:p>
      <text:p text:style-name="P1"><draw:frame draw:style-name="fr2" draw:name="Figura4" text:anchor-type="char" svg:width="19.001cm" svg:height="10.432cm" draw:z-index="3"><draw:image xlink:href="Pictures/10000000000002960000016511389C07.png" xlink:type="simple" xlink:show="embed" xlink:actuate="onLoad" draw:mime-type="image/png"/></draw:frame><draw:frame draw:style-name="fr3" draw:name="Figura3" text:anchor-type="char" svg:x="0.79cm" svg:y="23.264cm" svg:width="14.681cm" svg:height="14.109cm" draw:z-index="2"><draw:image xlink:href="Pictures/100000000000034E0000033F4D0A0579.png" xlink:type="simple" xlink:show="embed" xlink:actuate="onLoad" draw:mime-type="image/png"/></draw:frame></text:p>
      <text:p text:style-name="P1"><text:soft-page-break/></text:p>
      <text:p text:style-name="P2">Enviando Para o Git-Hub</text:p>
      <text:p text:style-name="P1"><draw:frame draw:style-name="fr1" draw:name="Figura5" text:anchor-type="char" svg:width="17cm" svg:height="3.429cm" draw:z-index="4"><draw:image xlink:href="Pictures/100000000000039F000000BBF068B6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3T19:50:06.072604555</meta:creation-date>
    <dc:date>2026-06-03T20:15:35.119118691</dc:date>
    <meta:editing-duration>PT3S</meta:editing-duration>
    <meta:editing-cycles>1</meta:editing-cycles>
    <meta:generator>LibreOffice/24.2.7.2$Linux_X86_64 LibreOffice_project/420$Build-2</meta:generator>
    <meta:document-statistic meta:table-count="0" meta:image-count="5" meta:object-count="0" meta:page-count="3" meta:paragraph-count="5" meta:word-count="33" meta:character-count="185" meta:non-whitespace-character-count="155"/>
  </office:meta>
</office:document-meta>
</file>